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9cm" loext:decorative="false"/>
      <style:paragraph-properties style:writing-mode="lr-tb"/>
      <style:text-properties loext:glow-text-radius="0.353cm" loext:glow-text-transparency="50%"/>
    </style:style>
    <style:style style:name="P1" style:family="paragraph">
      <style:paragraph-properties fo:text-align="center"/>
      <style:text-properties fo:color="#fde9a9" loext:opacity="100%" style:font-name="Liberation Mono"/>
    </style:style>
    <style:style style:name="P2" style:family="paragraph">
      <loext:graphic-properties draw:fill="none" draw:fill-color="#ffffff"/>
      <style:paragraph-properties fo:text-align="center"/>
      <style:text-properties fo:color="#fde9a9" loext:opacity="100%" style:font-name="Liberation Mono"/>
    </style:style>
    <style:style style:name="P3" style:family="paragraph">
      <style:paragraph-properties fo:text-align="center"/>
      <style:text-properties fo:color="#fde9a9" loext:opacity="100%" style:font-name="Liberation Mono" fo:font-size="18pt"/>
    </style:style>
    <style:style style:name="P4" style:family="paragraph">
      <loext:graphic-properties draw:fill="none" draw:fill-color="#ffffff"/>
      <style:paragraph-properties fo:text-align="center"/>
      <style:text-properties fo:color="#fde9a9" loext:opacity="100%" style:font-name="Liberation Mono" fo:font-size="18pt"/>
    </style:style>
    <style:style style:name="T1" style:family="text">
      <style:text-properties fo:color="#fde9a9" loext:opacity="100%"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In reg_1, return '5'</text:span></text:p>
          </draw:text-box>
        </draw:frame>
      </draw:page>
      <draw:page draw:name="page2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In reg_1, append '0'</text:span></text:p>
          </draw:text-box>
        </draw:frame>
      </draw:page>
      <draw:page draw:name="page3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In reg_1, append '0'</text:span></text:p>
          </draw:text-box>
        </draw:frame>
      </draw:page>
      <draw:page draw:name="page4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In reg_2, return '1'</text:span></text:p>
          </draw:text-box>
        </draw:frame>
      </draw:page>
      <draw:page draw:name="page5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In reg_3, return </text:span></text:p>
            <text:p text:style-name="P1"><text:span text:style-name="T1">reg_2 * 10</text:span></text:p>
          </draw:text-box>
        </draw:frame>
      </draw:page>
      <draw:page draw:name="page6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In reg_4, return </text:span></text:p>
            <text:p text:style-name="P1"><text:span text:style-name="T1">100 / 2</text:span></text:p>
          </draw:text-box>
        </draw:frame>
      </draw:page>
      <draw:page draw:name="page7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In reg_5, return</text:span></text:p>
            <text:p text:style-name="P1"><text:span text:style-name="T1">reg_4 / 5</text:span></text:p>
          </draw:text-box>
        </draw:frame>
      </draw:page>
      <draw:page draw:name="page8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In reg_6, return</text:span></text:p>
            <text:p text:style-name="P1"><text:span text:style-name="T1">reg_5 * reg_1</text:span></text:p>
          </draw:text-box>
        </draw:frame>
      </draw:page>
      <draw:page draw:name="page9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In reg_7, return </text:span></text:p>
            <text:p text:style-name="P1"><text:span text:style-name="T1">reg_3 / reg_6</text:span></text:p>
          </draw:text-box>
        </draw:frame>
      </draw:page>
      <draw:page draw:name="page10" draw:style-name="dp1" draw:master-page-name="Default">
        <draw:frame draw:style-name="gr1" draw:text-style-name="P4" draw:layer="layout" svg:width="11.078cm" svg:height="3.969cm" svg:x="1.861cm" svg:y="3.266cm">
          <draw:text-box>
            <text:p text:style-name="P3"><text:span text:style-name="T1">In reg_8, return</text:span></text:p>
            <text:p text:style-name="P3"><text:span text:style-name="T1">"All_"</text:span></text:p>
          </draw:text-box>
        </draw:frame>
      </draw:page>
      <draw:page draw:name="page11" draw:style-name="dp1" draw:master-page-name="Default">
        <draw:frame draw:style-name="gr1" draw:text-style-name="P4" draw:layer="layout" svg:width="11.078cm" svg:height="3.969cm" svg:x="1.861cm" svg:y="3.266cm">
          <draw:text-box>
            <text:p text:style-name="P3"><text:span text:style-name="T1">In reg_8, append</text:span></text:p>
            <text:p text:style-name="P3"><text:span text:style-name="T1">"of_"</text:span></text:p>
          </draw:text-box>
        </draw:frame>
      </draw:page>
      <draw:page draw:name="page12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In reg_8, append</text:span></text:p>
            <text:p text:style-name="P1"><text:span text:style-name="T1">"this_"</text:span></text:p>
          </draw:text-box>
        </draw:frame>
      </draw:page>
      <draw:page draw:name="page13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In reg_8, append</text:span></text:p>
            <text:p text:style-name="P1"><text:span text:style-name="T1">"ridi"</text:span></text:p>
          </draw:text-box>
        </draw:frame>
      </draw:page>
      <draw:page draw:name="page14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In reg_9, return</text:span></text:p>
            <text:p text:style-name="P1"><text:span text:style-name="T1">"culous_"</text:span></text:p>
          </draw:text-box>
        </draw:frame>
      </draw:page>
      <draw:page draw:name="page15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In reg_9, append</text:span><text:span text:style-name="T1"><text:line-break/></text:span><text:span text:style-name="T1">"maths_"</text:span></text:p>
          </draw:text-box>
        </draw:frame>
      </draw:page>
      <draw:page draw:name="page16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In reg_9, append</text:span><text:span text:style-name="T1"><text:line-break/></text:span><text:span text:style-name="T1">"jus"</text:span></text:p>
          </draw:text-box>
        </draw:frame>
      </draw:page>
      <draw:page draw:name="page17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In reg_10, return</text:span></text:p>
            <text:p text:style-name="P1"><text:span text:style-name="T1">"t_"</text:span></text:p>
          </draw:text-box>
        </draw:frame>
      </draw:page>
      <draw:page draw:name="page18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In reg_10, append</text:span></text:p>
            <text:p text:style-name="P1"><text:span text:style-name="T1">"to_"</text:span></text:p>
          </draw:text-box>
        </draw:frame>
      </draw:page>
      <draw:page draw:name="page19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In reg_10, append</text:span><text:span text:style-name="T1"><text:line-break/></text:span><text:span text:style-name="T1">"get_"</text:span></text:p>
          </draw:text-box>
        </draw:frame>
      </draw:page>
      <draw:page draw:name="page20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In reg_10, append</text:span></text:p>
            <text:p text:style-name="P1"><text:span text:style-name="T1">"a_"</text:span></text:p>
          </draw:text-box>
        </draw:frame>
      </draw:page>
      <draw:page draw:name="page21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In reg_10, append value</text:span><text:span text:style-name="T1"><text:line-break/></text:span><text:span text:style-name="T1">reg_7</text:span></text:p>
          </draw:text-box>
        </draw:frame>
      </draw:page>
      <draw:page draw:name="page22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Hold up an arm</text:span></text:p>
          </draw:text-box>
        </draw:frame>
      </draw:page>
      <draw:page draw:name="page23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Read the values of:</text:span><text:span text:style-name="T1"><text:line-break/></text:span><text:span text:style-name="T1">reg_8, reg_9, reg_10</text:span><text:span text:style-name="T1"><text:line-break/></text:span><text:span text:style-name="T1">+ "this was too simple"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svg:stroke-width="0.1cm" svg:stroke-color="#d36118" draw:marker-start-width="0.35cm" draw:marker-end-width="0.35cm" draw:fill="solid" draw:fill-color="#1c99e0" draw:textarea-horizontal-align="justify" draw:textarea-vertical-align="middle" draw:auto-grow-height="false" fo:min-height="7.422cm" fo:min-width="11.472cm" fo:padding-top="0.175cm" fo:padding-bottom="0.175cm" fo:padding-left="0.3cm" fo:padding-right="0.3cm" loext:decorative="false"/>
    </style:style>
    <style:style style:name="M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441cm" draw:shadow="hidden" loext:decorative="false"/>
      <style:paragraph-properties style:writing-mode="lr-tb"/>
      <style:text-properties loext:glow-text-radius="0cm" loext:glow-text-transparency="50%"/>
    </style:style>
    <style:style style:name="M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01cm" draw:shadow="hidden" loext:decorative="false"/>
      <style:paragraph-properties style:writing-mode="lr-tb"/>
      <style:text-properties loext:glow-text-radius="0.353cm" loext:glow-text-transparency="50%"/>
    </style:style>
    <style:style style:name="MP1" style:family="paragraph">
      <loext:graphic-properties draw:fill="solid" draw:fill-color="#1c99e0"/>
      <style:paragraph-properties fo:text-align="center"/>
    </style:style>
    <style:style style:name="MP2" style:family="paragraph">
      <style:paragraph-properties fo:text-align="center"/>
      <style:text-properties fo:color="#fde9a9" loext:opacity="100%" style:font-name="Liberation Mono" fo:background-color="transparent"/>
    </style:style>
    <style:style style:name="MP3" style:family="paragraph">
      <loext:graphic-properties draw:fill="none" draw:fill-color="#ffffff"/>
      <style:paragraph-properties fo:text-align="center"/>
      <style:text-properties fo:color="#fde9a9" loext:opacity="100%" style:font-name="Liberation Mono" fo:background-color="transparent"/>
    </style:style>
    <style:style style:name="MT1" style:family="text">
      <style:text-properties fo:color="#fde9a9" loext:opacity="100%" style:font-name="Liberation Mono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" draw:text-style-name="MP1" draw:layer="backgroundobjects" svg:width="12.8cm" svg:height="8.5cm" svg:x="1cm" svg:y="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position-x="$0" draw:handle-position-y="top" draw:handle-switched="true" draw:handle-range-x-minimum="0" draw:handle-range-x-maximum="10800"/>
        </draw:enhanced-geometry>
      </draw:custom-shape>
      <draw:frame draw:style-name="Mgr2" draw:text-style-name="MP3" draw:layer="backgroundobjects" svg:width="8.646cm" svg:height="1.691cm" svg:x="3.077cm" svg:y="1.136cm">
        <draw:text-box>
          <text:p text:style-name="MP2"><text:span text:style-name="MT1">INSTRUCTION #</text:span><text:span text:style-name="MT1"><text:page-number>&lt;number&gt;</text:page-number></text:span></text:p>
        </draw:text-box>
      </draw:frame>
      <draw:frame draw:style-name="Mgr3" draw:text-style-name="MP3" draw:layer="backgroundobjects" svg:width="5.33cm" svg:height="1.051cm" svg:x="4.735cm" svg:y="8.057cm">
        <draw:text-box>
          <text:p text:style-name="MP2"><text:span text:style-name="MT1">“RISC Style”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7T11:20:25.933725400</meta:creation-date>
    <dc:date>2025-06-17T12:03:28.895399600</dc:date>
    <meta:editing-duration>PT42M59S</meta:editing-duration>
    <meta:editing-cycles>7</meta:editing-cycles>
    <meta:generator>LibreOffice/25.2.4.3$Windows_X86_64 LibreOffice_project/33e196637044ead23f5c3226cde09b47731f7e27</meta:generator>
    <meta:print-date>2025-06-17T12:02:38.336864400</meta:print-date>
    <meta:printed-by>PDF files</meta:printed-by>
    <meta:document-statistic meta:object-count="26"/>
  </office:meta>
</office:document-meta>
</file>