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0f8" officeooo:paragraph-rsid="001490f8"/>
    </style:style>
    <style:style style:name="P2" style:family="paragraph" style:parent-style-name="Standard">
      <style:text-properties officeooo:rsid="00125119" officeooo:paragraph-rsid="00125119"/>
    </style:style>
    <style:style style:name="P3" style:family="paragraph" style:parent-style-name="Standard">
      <style:text-properties officeooo:rsid="001378e6" officeooo:paragraph-rsid="001378e6"/>
    </style:style>
    <style:style style:name="T1" style:family="text">
      <style:text-properties officeooo:rsid="00149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</text:p>
      <text:p text:style-name="P2">Computer Instruction Set Architecture refers specifically to the physical design of a CPU.</text:p>
      <text:p text:style-name="P2"/>
      <text:p text:style-name="P2">FALSE -<text:tab/>That is the microarchitecture.</text:p>
      <text:p text:style-name="P1">__________</text:p>
      <text:p text:style-name="P2">Instruction Set Architectures describe the machine code instructions available to a computer, along with human-readable assembly code definitions.</text:p>
      <text:p text:style-name="P2"/>
      <text:p text:style-name="P2">TRUE -<text:tab/>They also define things like the structure of the register.</text:p>
      <text:p text:style-name="P1">__________</text:p>
      <text:p text:style-name="P2">The most commonly used instruction set architecture in personal computers, dates back to the 1970’s.</text:p>
      <text:p text:style-name="P2"/>
      <text:p text:style-name="P2">TRUE -<text:tab/>x86 was introduced in 1978 and modern implementations are backwards compatible <text:tab/><text:tab/>with processors from 1985.</text:p>
      <text:p text:style-name="P1">__________</text:p>
      <text:p text:style-name="P2">A very common instruction set architecture in mobile phones is RISC-V.</text:p>
      <text:p text:style-name="P2"/>
      <text:p text:style-name="P2">FALSE -<text:tab/>RISC-V is gaining traction in embedded devices and may become the next big <text:tab/><text:tab/><text:tab/>standard. For now ARM64 is most commonly found in phones.</text:p>
      <text:p text:style-name="P1">__________</text:p>
      <text:p text:style-name="P3">An advantage of the register is that it can hold a large amount of data.</text:p>
      <text:p text:style-name="P3"/>
      <text:p text:style-name="P3">FALSE -<text:tab/>The register holds a tiny amount of data compared to your computer’s main memory.<text:tab/><text:tab/>However, this data can be accessed at extreme speeds.</text:p>
      <text:p text:style-name="P1">__________</text:p>
      <text:p text:style-name="P3">Instructions can take as long to process as they need.</text:p>
      <text:p text:style-name="P3"/>
      <text:p text:style-name="P3">FALSE -<text:tab/>Instructions must be processed between regular ticks of the CPU clock. Therefore, <text:tab/><text:tab/>very complex instruction sets may require slower clock speeds.</text:p>
      <text:p text:style-name="P1">__________</text:p>
      <text:p text:style-name="P3">CISC stands for “Complex Instruction Set Compter.”</text:p>
      <text:p text:style-name="P3"/>
      <text:p text:style-name="P3">TRUE</text:p>
      <text:p text:style-name="P1">__________</text:p>
      <text:p text:style-name="P3">RISC stands for Restricted Instruction Set Computer.”</text:p>
      <text:p text:style-name="P3"/>
      <text:p text:style-name="P3">FALSE - <text:tab/><text:span text:style-name="T1">It s</text:span>tands for Reduced Instruction Set Computer.”</text:p>
      <text:p text:style-name="P1">__________</text:p>
      <text:p text:style-name="P3">Simplified instruction set design principles, like RISC, can make more efficient use of less powerful hardware.</text:p>
      <text:p text:style-name="P3"/>
      <text:p text:style-name="P3">TRUE -<text:tab/>The computer has less to process with each instruction, resulting in steadier <text:tab/><text:tab/><text:tab/>performance, even if still a bit slow.</text:p>
      <text:p text:style-name="P1">__________</text:p>
      <text:p text:style-name="P3">Most new instruction sets are “CISC style” as they can take better advantage of more powerful modern hardware.</text:p>
      <text:p text:style-name="P3"/>
      <text:p text:style-name="P3">FALSE -<text:tab/>Only one new CISC ISA has been produced since the 80’s. The vast majority of new <text:tab/><text:tab/>instruction sets since then have been “RISC style.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2:12:50.099152700</meta:creation-date>
    <dc:date>2025-06-17T12:39:13.297871700</dc:date>
    <meta:editing-duration>PT15M21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30" meta:word-count="305" meta:character-count="1944" meta:non-whitespace-character-count="1655"/>
  </office:meta>
</office:document-meta>
</file>